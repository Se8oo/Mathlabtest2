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fo:color="#000000" style:font-name="lucidatypewriter" fo:font-size="10pt" style:font-size-asian="10pt"/>
    </style:style>
    <style:style style:name="T2" style:family="text">
      <style:text-properties fo:color="#028009" style:font-name="lucidatypewriter" fo:font-size="10pt" style:font-size-asian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te=out.ScopeData.time; <text:s/></text:span></text:p>
      <text:p text:style-name="Standard"><text:span text:style-name="T1">ue=out.ScopeData.signals(1).values; <text:s/></text:span></text:p>
      <text:p text:style-name="Standard"><text:span text:style-name="T1">ye=out.ScopeData.signals(2).values; <text:s/></text:span></text:p>
      <text:p text:style-name="Standard"><text:span text:style-name="T1"><text:s/></text:span></text:p>
      <text:p text:style-name="Standard"><text:span text:style-name="T1">n=max(find(te&lt;=1500))</text:span></text:p>
      <text:p text:style-name="Standard"><text:span text:style-name="T1">t=te(n:end)-te(n)</text:span></text:p>
      <text:p text:style-name="Standard"><text:span text:style-name="T1">u=ue(n:end)-ue(n-1)</text:span></text:p>
      <text:p text:style-name="Standard"><text:span text:style-name="T1">y=ye(n:end)-ye(n)</text:span></text:p>
      <text:p text:style-name="Standard"><text:span text:style-name="T1"><text:s/></text:span></text:p>
      <text:p text:style-name="Standard"><text:span text:style-name="T2">%subplot(211)</text:span></text:p>
      <text:p text:style-name="Standard"><text:span text:style-name="T2">%plot(t,u)</text:span></text:p>
      <text:p text:style-name="Standard"><text:span text:style-name="T2">%subplot(212)</text:span></text:p>
      <text:p text:style-name="Standard"><text:span text:style-name="T2">%plot(t,y)</text:span></text:p>
      <text:p text:style-name="Standard"><text:span text:style-name="T1">uu=u(end)</text:span></text:p>
      <text:p text:style-name="Standard"><text:span text:style-name="T1">yu=y(end)</text:span></text:p>
      <text:p text:style-name="Standard"><text:span text:style-name="T1">n10=max(find(y&lt;=yu*0.1))</text:span></text:p>
      <text:p text:style-name="Standard"><text:span text:style-name="T1">t10=t(n10)</text:span></text:p>
      <text:p text:style-name="Standard"><text:span text:style-name="T1">y10=y(n10)</text:span></text:p>
      <text:p text:style-name="Standard"><text:span text:style-name="T1">n90=max(find(y&lt;=yu*0.9))</text:span></text:p>
      <text:p text:style-name="Standard"><text:span text:style-name="T1">t90=t(n90)</text:span></text:p>
      <text:p text:style-name="Standard"><text:span text:style-name="T1">y90=y(n90)</text:span></text:p>
      <text:p text:style-name="Standard"><text:span text:style-name="T1"><text:s/></text:span></text:p>
      <text:p text:style-name="Standard"><text:span text:style-name="T2">%plot(t,y,t10,y10,'*',t90,y90,'*')</text:span></text:p>
      <text:p text:style-name="Standard"><text:span text:style-name="T2"><text:s/></text:span></text:p>
      <text:p text:style-name="Standard"><text:span text:style-name="T1">k=yu/uu</text:span></text:p>
      <text:p text:style-name="Standard"><text:span text:style-name="T1">T=(t90-t10)/2.2</text:span></text:p>
      <text:p text:style-name="Standard"><text:span text:style-name="T1">tau=t10-0.1*T</text:span></text:p>
      <text:p text:style-name="Standard"><text:span text:style-name="T2">%opĂłĹşnienie</text:span></text:p>
      <text:p text:style-name="Standard"><text:span text:style-name="T1">[Lp Mp] = pade(tau,12)</text:span></text:p>
      <text:p text:style-name="Standard"><text:span text:style-name="T2">%inercja</text:span></text:p>
      <text:p text:style-name="Standard"><text:span text:style-name="T1">L=k</text:span></text:p>
      <text:p text:style-name="Standard"><text:span text:style-name="T1">M=[T 1]</text:span></text:p>
      <text:p text:style-name="Standard"><text:span text:style-name="T2">%inercja z opĂłĹşnieniem</text:span></text:p>
      <text:p text:style-name="Standard"><text:span text:style-name="T1">L=conv(L,Lp)</text:span></text:p>
      <text:p text:style-name="Standard"><text:span text:style-name="T1">M=conv(M,Mp)</text:span></text:p>
      <text:p text:style-name="Standard"><text:span text:style-name="T1">ymodel=lsim(L,M,u,t)</text:span></text:p>
      <text:p text:style-name="Standard"><text:span text:style-name="T1">plot(t,y,t,ymodel)</text:span></text:p>
      <text:p text:style-name="Standard"><text:span text:style-name="T1">plot(t,y-ymodel)</text:span></text:p>
      <text:p text:style-name="Standard"><text:span text:style-name="T1"><text:s/></text:span></text:p>
      <text:p text:style-name="Standard"><text:span text:style-name="T1">kp=(0.34*T)/(k*tau)</text:span></text:p>
      <text:p text:style-name="Standard"><text:span text:style-name="T1">Ti=T</text:span></text:p>
      <text:p text:style-name="Standard"><text:span text:style-name="T1">ki=kp/Ti</text:span></text:p>
      <text:p text:style-name="Standard"><text:span text:style-name="T1"><text:s/></text:span></text:p>
      <text:p text:style-name="Standard"><text:span text:style-name="T1"><text:s/></text:span></text:p>
      <text:p text:style-name="Standard"><text:span text:style-name="T2">%plot(te, ye)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45" meta:word-count="45" meta:character-count="599" meta:non-whitespace-character-count="579"/>
  </office:meta>
</office:document-meta>
</file>